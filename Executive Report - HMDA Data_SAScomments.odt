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80000037C1AFC5015.png" manifest:media-type="image/png"/>
  <manifest:file-entry manifest:full-path="Pictures/10000001000002C6000001F15249A91E.png" manifest:media-type="image/png"/>
  <manifest:file-entry manifest:full-path="Pictures/10000001000002C60000024D72E04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021in" fo:margin-left="0in" table:align="left" style:may-break-between-rows="false"/>
    </style:style>
    <style:style style:name="Table1.A" style:family="table-column">
      <style:table-column-properties style:column-width="1.5007in"/>
    </style:style>
    <style:style style:name="Table1.B" style:family="table-column">
      <style:table-column-properties style:column-width="4.5014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="0.0799in" fo:border-left="0.5pt solid #808080" fo:border-right="none" fo:border-top="0.5pt solid #808080" fo:border-bottom="0.5pt solid #808080" style:writing-mode="lr-tb"/>
    </style:style>
    <style:style style:name="Table1.B1" style:family="table-cell">
      <style:table-cell-properties fo:padding="0.0799in" fo:border-left="none" fo:border-right="0.5pt solid #808080" fo:border-top="0.5pt solid #808080" fo:border-bottom="0.5pt solid #808080" style:writing-mode="lr-tb"/>
    </style:style>
    <style:style style:name="Table1.A2" style:family="table-cell">
      <style:table-cell-properties fo:padding="0.0799in" fo:border-left="0.5pt solid #808080" fo:border-right="none" fo:border-top="none" fo:border-bottom="0.5pt solid #808080" style:writing-mode="lr-tb"/>
    </style:style>
    <style:style style:name="Table1.B2" style:family="table-cell">
      <style:table-cell-properties fo:padding="0.0799in" fo:border-left="none" fo:border-right="0.5pt solid #808080" fo:border-top="none" fo:border-bottom="0.5pt solid #808080" style:writing-mode="lr-tb"/>
    </style:style>
    <style:style style:name="Table2" style:family="table">
      <style:table-properties style:width="5.5in" table:align="center" style:may-break-between-rows="false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0.5in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="0.0597in" fo:border-left="0.5pt solid #808080" fo:border-right="none" fo:border-top="0.5pt solid #808080" fo:border-bottom="0.5pt solid #808080" style:writing-mode="lr-tb"/>
    </style:style>
    <style:style style:name="Table2.B1" style:family="table-cell">
      <style:table-cell-properties fo:padding="0.0597in" fo:border-left="none" fo:border-right="0.5pt solid #808080" fo:border-top="0.5pt solid #808080" fo:border-bottom="0.5pt solid #808080" style:writing-mode="lr-tb"/>
    </style:style>
    <style:style style:name="Table2.C1" style:family="table-cell">
      <style:table-cell-properties fo:padding="0.0597in" fo:border="none" style:writing-mode="lr-tb"/>
    </style:style>
    <style:style style:name="Table2.D1" style:family="table-cell">
      <style:table-cell-properties fo:background-color="#eeeeee" fo:padding="0.0597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2.E1" style:family="table-cell">
      <style:table-cell-properties fo:background-color="#eeeeee" fo:padding="0.0597in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e2.A2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2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D2" style:family="table-cell">
      <style:table-cell-properties fo:background-color="#eeeeee" fo:padding="0.0597in" fo:border-left="0.5pt solid #808080" fo:border-right="none" fo:border-top="none" fo:border-bottom="0.5pt solid #808080" style:writing-mode="lr-tb">
        <style:background-image/>
      </style:table-cell-properties>
    </style:style>
    <style:style style:name="Table2.E2" style:family="table-cell">
      <style:table-cell-properties fo:background-color="#eeeeee" fo:padding="0.0597in" fo:border-left="none" fo:border-right="0.5pt solid #808080" fo:border-top="none" fo:border-bottom="0.5pt solid #808080" style:writing-mode="lr-tb">
        <style:background-image/>
      </style:table-cell-properties>
    </style:style>
    <style:style style:name="Table2.A3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3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4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4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5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5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6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6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7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7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8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8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9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9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10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10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2.A11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2.B11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3" style:family="table">
      <style:table-properties style:width="2in" table:align="center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0.875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799in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fo:padding="0.0799in" fo:border-left="none" fo:border-right="0.5pt solid #808080" fo:border-top="0.5pt solid #808080" fo:border-bottom="0.5pt solid #808080" style:writing-mode="lr-tb"/>
    </style:style>
    <style:style style:name="Table3.A2" style:family="table-cell">
      <style:table-cell-properties fo:padding="0.0799in" fo:border-left="0.5pt solid #808080" fo:border-right="none" fo:border-top="none" fo:border-bottom="0.5pt solid #808080" style:writing-mode="lr-tb"/>
    </style:style>
    <style:style style:name="Table3.B2" style:family="table-cell">
      <style:table-cell-properties fo:padding="0.0799in" fo:border-left="none" fo:border-right="0.5pt solid #808080" fo:border-top="none" fo:border-bottom="0.5pt solid #808080" style:writing-mode="lr-tb"/>
    </style:style>
    <style:style style:name="Table4" style:family="table">
      <style:table-properties style:width="4in" table:align="center"/>
    </style:style>
    <style:style style:name="Table4.A" style:family="table-column">
      <style:table-column-properties style:column-width="3.0007in"/>
    </style:style>
    <style:style style:name="Table4.B" style:family="table-column">
      <style:table-column-properties style:column-width="0.9993in"/>
    </style:style>
    <style:style style:name="Table4.1" style:family="table-row">
      <style:table-row-properties fo:keep-together="always" style:use-optimal-row-height="false"/>
    </style:style>
    <style:style style:name="Table4.A1" style:family="table-cell">
      <style:table-cell-properties fo:padding="0.0799in" fo:border-left="0.5pt solid #808080" fo:border-right="none" fo:border-top="0.5pt solid #808080" fo:border-bottom="0.5pt solid #808080" style:writing-mode="lr-tb"/>
    </style:style>
    <style:style style:name="Table4.B1" style:family="table-cell">
      <style:table-cell-properties fo:padding="0.0799in" fo:border-left="none" fo:border-right="0.5pt solid #808080" fo:border-top="0.5pt solid #808080" fo:border-bottom="0.5pt solid #808080" style:writing-mode="lr-tb"/>
    </style:style>
    <style:style style:name="Table4.A2" style:family="table-cell">
      <style:table-cell-properties fo:padding="0.0799in" fo:border-left="0.5pt solid #808080" fo:border-right="none" fo:border-top="none" fo:border-bottom="0.5pt solid #808080" style:writing-mode="lr-tb"/>
    </style:style>
    <style:style style:name="Table4.B2" style:family="table-cell">
      <style:table-cell-properties fo:padding="0.0799in" fo:border-left="none" fo:border-right="0.5pt solid #808080" fo:border-top="none" fo:border-bottom="0.5pt solid #808080" style:writing-mode="lr-tb"/>
    </style:style>
    <style:style style:name="Table5" style:family="table">
      <style:table-properties style:width="5.5in" table:align="center" style:may-break-between-rows="false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0.5in"/>
    </style:style>
    <style:style style:name="Table5.1" style:family="table-row">
      <style:table-row-properties fo:keep-together="always" style:use-optimal-row-height="false"/>
    </style:style>
    <style:style style:name="Table5.A1" style:family="table-cell">
      <style:table-cell-properties fo:padding="0.0597in" fo:border-left="0.5pt solid #808080" fo:border-right="none" fo:border-top="0.5pt solid #808080" fo:border-bottom="0.5pt solid #808080" style:writing-mode="lr-tb"/>
    </style:style>
    <style:style style:name="Table5.B1" style:family="table-cell">
      <style:table-cell-properties fo:padding="0.0597in" fo:border-left="none" fo:border-right="0.5pt solid #808080" fo:border-top="0.5pt solid #808080" fo:border-bottom="0.5pt solid #808080" style:writing-mode="lr-tb"/>
    </style:style>
    <style:style style:name="Table5.C1" style:family="table-cell">
      <style:table-cell-properties fo:padding="0.0597in" fo:border="none" style:writing-mode="lr-tb"/>
    </style:style>
    <style:style style:name="Table5.D1" style:family="table-cell">
      <style:table-cell-properties fo:background-color="#eeeeee" fo:padding="0.0597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5.E1" style:family="table-cell">
      <style:table-cell-properties fo:background-color="#eeeeee" fo:padding="0.0597in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e5.A2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2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D2" style:family="table-cell">
      <style:table-cell-properties fo:background-color="#eeeeee" fo:padding="0.0597in" fo:border-left="0.5pt solid #808080" fo:border-right="none" fo:border-top="none" fo:border-bottom="0.5pt solid #808080" style:writing-mode="lr-tb">
        <style:background-image/>
      </style:table-cell-properties>
    </style:style>
    <style:style style:name="Table5.E2" style:family="table-cell">
      <style:table-cell-properties fo:background-color="#eeeeee" fo:padding="0.0597in" fo:border-left="none" fo:border-right="0.5pt solid #808080" fo:border-top="none" fo:border-bottom="0.5pt solid #808080" style:writing-mode="lr-tb">
        <style:background-image/>
      </style:table-cell-properties>
    </style:style>
    <style:style style:name="Table5.A3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3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4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4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5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5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6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6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7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7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8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8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9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9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10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10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5.A11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5.B11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6" style:family="table">
      <style:table-properties style:width="5in" table:align="center" style:may-break-between-rows="false"/>
    </style:style>
    <style:style style:name="Table6.A" style:family="table-column">
      <style:table-column-properties style:column-width="3in"/>
    </style:style>
    <style:style style:name="Table6.B" style:family="table-column">
      <style:table-column-properties style:column-width="1in"/>
    </style:style>
    <style:style style:name="Table6.1" style:family="table-row">
      <style:table-row-properties fo:keep-together="always" style:use-optimal-row-height="false"/>
    </style:style>
    <style:style style:name="Table6.A1" style:family="table-cell">
      <style:table-cell-properties fo:padding="0.0799in" fo:border-left="0.5pt solid #808080" fo:border-right="none" fo:border-top="0.5pt solid #808080" fo:border-bottom="0.5pt solid #808080" style:writing-mode="lr-tb"/>
    </style:style>
    <style:style style:name="Table6.B1" style:family="table-cell">
      <style:table-cell-properties fo:padding="0.0799in" fo:border-left="none" fo:border-right="none" fo:border-top="0.5pt solid #808080" fo:border-bottom="0.5pt solid #808080" style:writing-mode="lr-tb"/>
    </style:style>
    <style:style style:name="Table6.C1" style:family="table-cell">
      <style:table-cell-properties fo:padding="0.0799in" fo:border-left="none" fo:border-right="0.5pt solid #808080" fo:border-top="0.5pt solid #808080" fo:border-bottom="0.5pt solid #808080" style:writing-mode="lr-tb"/>
    </style:style>
    <style:style style:name="Table6.A2" style:family="table-cell">
      <style:table-cell-properties fo:padding="0.0799in" fo:border-left="0.5pt solid #808080" fo:border-right="none" fo:border-top="none" fo:border-bottom="0.5pt solid #808080" style:writing-mode="lr-tb"/>
    </style:style>
    <style:style style:name="Table6.B2" style:family="table-cell">
      <style:table-cell-properties fo:padding="0.0799in" fo:border-left="none" fo:border-right="none" fo:border-top="none" fo:border-bottom="0.5pt solid #808080" style:writing-mode="lr-tb"/>
    </style:style>
    <style:style style:name="Table6.C2" style:family="table-cell">
      <style:table-cell-properties fo:padding="0.0799in" fo:border-left="none" fo:border-right="0.5pt solid #808080" fo:border-top="none" fo:border-bottom="0.5pt solid #808080" style:writing-mode="lr-tb"/>
    </style:style>
    <style:style style:name="Table6.A8" style:family="table-cell">
      <style:table-cell-properties fo:padding="0.0799in" fo:border="none" style:writing-mode="lr-tb"/>
    </style:style>
    <style:style style:name="Table7" style:family="table">
      <style:table-properties style:width="3in" table:align="center"/>
    </style:style>
    <style:style style:name="Table7.A" style:family="table-column">
      <style:table-column-properties style:column-width="1.9951in"/>
    </style:style>
    <style:style style:name="Table7.B" style:family="table-column">
      <style:table-column-properties style:column-width="1.0049in"/>
    </style:style>
    <style:style style:name="Table7.1" style:family="table-row">
      <style:table-row-properties fo:keep-together="always" style:use-optimal-row-height="false"/>
    </style:style>
    <style:style style:name="Table7.A1" style:family="table-cell">
      <style:table-cell-properties fo:padding="0.0597in" fo:border-left="0.5pt solid #808080" fo:border-right="none" fo:border-top="0.5pt solid #808080" fo:border-bottom="0.5pt solid #808080" style:writing-mode="lr-tb"/>
    </style:style>
    <style:style style:name="Table7.B1" style:family="table-cell">
      <style:table-cell-properties fo:padding="0.0597in" fo:border-left="none" fo:border-right="0.5pt solid #808080" fo:border-top="0.5pt solid #808080" fo:border-bottom="0.5pt solid #808080" style:writing-mode="lr-tb"/>
    </style:style>
    <style:style style:name="Table7.A2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7.B2" style:family="table-cell">
      <style:table-cell-properties fo:padding="0.0597in" fo:border-left="none" fo:border-right="0.5pt solid #808080" fo:border-top="none" fo:border-bottom="0.5pt solid #808080" style:writing-mode="lr-tb"/>
    </style:style>
    <style:style style:name="Table8" style:family="table">
      <style:table-properties style:width="6in" fo:margin-left="0in" table:align="left"/>
    </style:style>
    <style:style style:name="Table8.A" style:family="table-column">
      <style:table-column-properties style:column-width="2in"/>
    </style:style>
    <style:style style:name="Table8.1" style:family="table-row">
      <style:table-row-properties fo:keep-together="always" style:use-optimal-row-height="false"/>
    </style:style>
    <style:style style:name="Table8.A1" style:family="table-cell">
      <style:table-cell-properties fo:padding="0.0597in" fo:border-left="0.5pt solid #808080" fo:border-right="none" fo:border-top="0.5pt solid #808080" fo:border-bottom="0.5pt solid #808080" style:writing-mode="lr-tb"/>
    </style:style>
    <style:style style:name="Table8.C1" style:family="table-cell">
      <style:table-cell-properties fo:padding="0.0597in" fo:border="0.5pt solid #808080" style:writing-mode="lr-tb"/>
    </style:style>
    <style:style style:name="Table8.A2" style:family="table-cell">
      <style:table-cell-properties fo:padding="0.0597in" fo:border-left="0.5pt solid #808080" fo:border-right="none" fo:border-top="none" fo:border-bottom="0.5pt solid #808080" style:writing-mode="lr-tb"/>
    </style:style>
    <style:style style:name="Table8.C2" style:family="table-cell">
      <style:table-cell-properties fo:padding="0.0597in" fo:border-left="0.5pt solid #808080" fo:border-right="0.5pt solid #808080" fo:border-top="none" fo:border-bottom="0.5pt solid #808080" style:writing-mode="lr-tb"/>
    </style:style>
    <style:style style:name="Table9" style:family="table">
      <style:table-properties style:width="3.9993in" fo:margin-left="0.75in" table:align="left"/>
    </style:style>
    <style:style style:name="Table9.A" style:family="table-column">
      <style:table-column-properties style:column-width="3.0007in"/>
    </style:style>
    <style:style style:name="Table9.B" style:family="table-column">
      <style:table-column-properties style:column-width="0.9986in"/>
    </style:style>
    <style:style style:name="Table9.1" style:family="table-row">
      <style:table-row-properties fo:keep-together="always" style:use-optimal-row-height="false"/>
    </style:style>
    <style:style style:name="Table9.A1" style:family="table-cell">
      <style:table-cell-properties fo:padding="0.0799in" fo:border-left="0.5pt solid #808080" fo:border-right="none" fo:border-top="0.5pt solid #808080" fo:border-bottom="0.5pt solid #808080" style:writing-mode="lr-tb"/>
    </style:style>
    <style:style style:name="Table9.B1" style:family="table-cell">
      <style:table-cell-properties fo:padding="0.0799in" fo:border-left="none" fo:border-right="0.5pt solid #808080" fo:border-top="0.5pt solid #808080" fo:border-bottom="0.5pt solid #808080" style:writing-mode="lr-tb"/>
    </style:style>
    <style:style style:name="Table9.A2" style:family="table-cell">
      <style:table-cell-properties fo:padding="0.0799in" fo:border-left="0.5pt solid #808080" fo:border-right="none" fo:border-top="none" fo:border-bottom="0.5pt solid #808080" style:writing-mode="lr-tb"/>
    </style:style>
    <style:style style:name="Table9.B2" style:family="table-cell">
      <style:table-cell-properties fo:padding="0.0799in" fo:border-left="none" fo:border-right="0.5pt solid #808080" fo:border-top="none" fo:border-bottom="0.5pt solid #808080" style:writing-mode="lr-tb"/>
    </style:style>
    <style:style style:name="P1" style:family="paragraph" style:parent-style-name="Title" style:master-page-name="MP0">
      <style:paragraph-properties fo:text-align="start" style:justify-single-word="false" style:page-number="auto" fo:break-before="page" style:writing-mode="lr-tb" style:writing-mode-automatic="false"/>
      <style:text-properties fo:font-size="20pt" fo:font-weight="normal" officeooo:paragraph-rsid="0000c52b" style:font-size-asian="20pt" style:font-weight-asian="normal" style:font-size-complex="20pt" style:font-weight-complex="normal"/>
    </style:style>
    <style:style style:name="P2" style:family="paragraph" style:parent-style-name="Text_20_body">
      <style:text-properties fo:font-style="italic" officeooo:rsid="0000c52b" officeooo:paragraph-rsid="0000c52b" style:font-style-asian="italic" style:font-style-complex="italic"/>
    </style:style>
    <style:style style:name="P3" style:family="paragraph" style:parent-style-name="Heading_20_1">
      <style:text-properties officeooo:paragraph-rsid="0000c52b"/>
    </style:style>
    <style:style style:name="P4" style:family="paragraph" style:parent-style-name="Text_20_body" style:list-style-name="L1"/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Heading">
      <style:text-properties fo:color="#94070a" loext:opacity="100%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ext_20_body">
      <style:text-properties officeooo:paragraph-rsid="00027b40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text-properties fo:color="#ed1c24" loext:opacity="100%"/>
    </style:style>
    <style:style style:name="P12" style:family="paragraph" style:parent-style-name="Table_20_Heading">
      <style:paragraph-properties fo:text-align="end" style:justify-single-word="false"/>
      <style:text-properties fo:color="#ed1c24" loext:opacity="100%"/>
    </style:style>
    <style:style style:name="P13" style:family="paragraph" style:parent-style-name="Standard">
      <style:text-properties fo:color="#610506" loext:opacity="100%"/>
    </style:style>
    <style:style style:name="P14" style:family="paragraph" style:parent-style-name="Standard">
      <style:paragraph-properties fo:text-align="end" style:justify-single-word="false"/>
      <style:text-properties fo:color="#610506" loext:opacity="100%"/>
    </style:style>
    <style:style style:name="P1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name-complex="Mang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d6f6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of Home Mortgage Data</text:p>
      <text:p text:style-name="P2">Justin Sharber</text:p>
      <text:h text:style-name="P3" text:outline-level="1">Executive Summary Outline </text:h>
      <text:p text:style-name="Text_20_body">This project analyzes loan acceptance rates in publicly available home mortgage data, with two goals. <text:s/></text:p>
      <text:list text:style-name="L1">
        <text:list-item>
          <text:p text:style-name="P4">Predict loan acceptances based on the available data. <text:s/>The result is a mediocre predictive accuracy of 70%.</text:p>
        </text:list-item>
        <text:list-item>
          <text:p text:style-name="P4">Analyze loan acceptance rates for unfair discrimination. <text:s/>A discriminatory effect is found, but it is tiny.</text:p>
        </text:list-item>
      </text:list>
      <text:h text:style-name="Heading_20_1" text:outline-level="1">Predicting Loan Acceptance</text:h>
      <text:p text:style-name="Text_20_body">The Home Mortgage Disclosure Act of 1975 requires financial institutions to report information about loan applications. <text:s/>This data allows us to determine whether loan practices are serving people well, as well as whether any unfair discrimination exists in the industry. <text:s/>The goal of this project is to determine which factors are relevant to loan acceptance. <text:s/>To achieve this goal, the project seeks to predict loan acceptance rates. <text:s/>The result is that only half of the available features are necessary to exhaust the predictive power of the dataset.</text:p>
      <text:p text:style-name="Text_20_body">The dataset is substantial, with almost 440,000 complete records out of a total 500,000. <text:s/>It contains four main categories of data, summarized below.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Table_20_Heading">Property Location</text:p>
          </table:table-cell>
          <table:table-cell table:style-name="Table1.B1" office:value-type="string">
            <text:p text:style-name="Table_20_Contents">Location of the property, including codes for metropolitan area, county, and state. <text:s/>Some of this data was incomplete.</text:p>
          </table:table-cell>
        </table:table-row>
        <table:table-row table:style-name="Table1.1">
          <table:table-cell table:style-name="Table1.A2" office:value-type="string">
            <text:p text:style-name="Table_20_Heading">Loan Information</text:p>
          </table:table-cell>
          <table:table-cell table:style-name="Table1.B2" office:value-type="string">
            <text:p text:style-name="Table_20_Contents">Including the lender, loan amount, loan type, the type of housing, the purpose of the loan (ex: home improvement), occupancy, and whether preapproval was requested.</text:p>
          </table:table-cell>
        </table:table-row>
        <table:table-row table:style-name="Table1.1">
          <table:table-cell table:style-name="Table1.A2" office:value-type="string">
            <text:p text:style-name="Table_20_Heading">Applicant Information</text:p>
          </table:table-cell>
          <table:table-cell table:style-name="Table1.B2" office:value-type="string">
            <text:p text:style-name="Table_20_Contents">Including the applicant’s income, ethnicity (vis whether Hispanic / Latino), race, sex, and whether there was a co-applicant.</text:p>
          </table:table-cell>
        </table:table-row>
        <table:table-row table:style-name="Table1.1">
          <table:table-cell table:style-name="Table1.A2" office:value-type="string">
            <text:p text:style-name="Table_20_Heading">Census Information</text:p>
          </table:table-cell>
          <table:table-cell table:style-name="Table1.B2" office:value-type="string">
            <text:p text:style-name="Table_20_Contents">Information about the tract where the loan request was made: population, minority percentage of the population, FFIEC median family income for the tract’s metropolitan area (Metropolitan Statistical Area / Metropolitan Division, MSA/MD), and several other statistics.</text:p>
          </table:table-cell>
        </table:table-row>
      </table:table>
      <text:p text:style-name="Caption">Summary of features in the dataset.</text:p>
      <text:p text:style-name="Text_20_body">To get a sense of the relative importance of different features, logistic regressions were run independently on each. <text:s/>Many features had weak predictive power. <text:s/></text:p>
      <text:p text:style-name="Text_20_body">The predictive accuracy of each feature is shown below, split into two groups. <text:s/>Later, the accuracy of the first group, “Feature Set 1,” will be compared to the whole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Table_20_Heading">Feature Set 1</text:p>
          </table:table-cell>
          <table:table-cell table:style-name="Table2.B1" office:value-type="string">
            <text:p text:style-name="P5">Acc.</text:p>
          </table:table-cell>
          <table:table-cell table:style-name="Table2.C1" office:value-type="string">
            <text:p text:style-name="Table_20_Contents"/>
          </table:table-cell>
          <table:table-cell table:style-name="Table2.D1" office:value-type="string">
            <text:p text:style-name="P6">Feature Set 2</text:p>
          </table:table-cell>
          <table:table-cell table:style-name="Table2.E1" office:value-type="string">
            <text:p text:style-name="P6">Acc.</text:p>
          </table:table-cell>
        </table:table-row>
        <table:table-row table:style-name="Table2.1">
          <table:table-cell table:style-name="Table2.A2" office:value-type="string">
            <text:p text:style-name="Standard">lender</text:p>
          </table:table-cell>
          <table:table-cell table:style-name="Table2.B2" office:value-type="string">
            <text:p text:style-name="P7">0.66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property_type</text:p>
          </table:table-cell>
          <table:table-cell table:style-name="Table2.E2" office:value-type="string">
            <text:p text:style-name="Standard">0.54</text:p>
          </table:table-cell>
        </table:table-row>
        <table:table-row table:style-name="Table2.1">
          <table:table-cell table:style-name="Table2.A3" office:value-type="string">
            <text:p text:style-name="Standard">loan_purpose</text:p>
          </table:table-cell>
          <table:table-cell table:style-name="Table2.B3" office:value-type="string">
            <text:p text:style-name="P7">0.61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state_code</text:p>
          </table:table-cell>
          <table:table-cell table:style-name="Table2.E2" office:value-type="string">
            <text:p text:style-name="Standard">0.54</text:p>
          </table:table-cell>
        </table:table-row>
        <table:table-row table:style-name="Table2.1">
          <table:table-cell table:style-name="Table2.A4" office:value-type="string">
            <text:p text:style-name="Standard">loan_amount</text:p>
          </table:table-cell>
          <table:table-cell table:style-name="Table2.B4" office:value-type="string">
            <text:p text:style-name="P7">0.58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applicant_sex</text:p>
          </table:table-cell>
          <table:table-cell table:style-name="Table2.E2" office:value-type="string">
            <text:p text:style-name="Standard">0.53</text:p>
          </table:table-cell>
        </table:table-row>
        <table:table-row table:style-name="Table2.1">
          <table:table-cell table:style-name="Table2.A5" office:value-type="string">
            <text:p text:style-name="Standard">applicant_income</text:p>
          </table:table-cell>
          <table:table-cell table:style-name="Table2.B5" office:value-type="string">
            <text:p text:style-name="P7">0.58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preapproval</text:p>
          </table:table-cell>
          <table:table-cell table:style-name="Table2.E2" office:value-type="string">
            <text:p text:style-name="Standard">0.53</text:p>
          </table:table-cell>
        </table:table-row>
        <table:table-row table:style-name="Table2.1">
          <table:table-cell table:style-name="Table2.A6" office:value-type="string">
            <text:p text:style-name="Standard">applicant_race</text:p>
          </table:table-cell>
          <table:table-cell table:style-name="Table2.B6" office:value-type="string">
            <text:p text:style-name="P7">0.57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county_code</text:p>
          </table:table-cell>
          <table:table-cell table:style-name="Table2.E2" office:value-type="string">
            <text:p text:style-name="Standard">0.53</text:p>
          </table:table-cell>
        </table:table-row>
        <table:table-row table:style-name="Table2.1">
          <table:table-cell table:style-name="Table2.A7" office:value-type="string">
            <text:p text:style-name="Standard">applicant_ethnicity</text:p>
          </table:table-cell>
          <table:table-cell table:style-name="Table2.B7" office:value-type="string">
            <text:p text:style-name="P7">0.55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loan_type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A8" office:value-type="string">
            <text:p text:style-name="Standard">co_applicant</text:p>
          </table:table-cell>
          <table:table-cell table:style-name="Table2.B8" office:value-type="string">
            <text:p text:style-name="P7">0.55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occupancy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A9" office:value-type="string">
            <text:p text:style-name="Standard">msa_md</text:p>
          </table:table-cell>
          <table:table-cell table:style-name="Table2.B9" office:value-type="string">
            <text:p text:style-name="P7">0.55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population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A10" office:value-type="string">
            <text:p text:style-name="Standard">minority_population_pct</text:p>
          </table:table-cell>
          <table:table-cell table:style-name="Table2.B10" office:value-type="string">
            <text:p text:style-name="P7">0.55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ffiecmedian_family_income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A11" office:value-type="string">
            <text:p text:style-name="Standard">tract_to_msa_md_income_pct</text:p>
          </table:table-cell>
          <table:table-cell table:style-name="Table2.B11" office:value-type="string">
            <text:p text:style-name="P7">0.55</text:p>
          </table:table-cell>
          <table:table-cell table:style-name="Table2.C1" office:value-type="string">
            <text:p text:style-name="P7"/>
          </table:table-cell>
          <table:table-cell table:style-name="Table2.D2" office:value-type="string">
            <text:p text:style-name="Standard">number_of_owner-occupied_units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  <table:table-cell table:style-name="Table2.D2" office:value-type="string">
            <text:p text:style-name="Standard">number_of_1_to_4_family_units</text:p>
          </table:table-cell>
          <table:table-cell table:style-name="Table2.E2" office:value-type="string">
            <text:p text:style-name="Standard">0.52</text:p>
          </table:table-cell>
        </table:table-row>
        <table:table-row table:style-name="Table2.1">
          <table:table-cell table:style-name="Table2.C1" table:number-columns-spanned="5" office:value-type="string">
            <text:p text:style-name="P8">Predictive power of features, taken independently.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>It may come as a surprise that the individual lender was the most predictive feature in the data. <text:s/>Several other features with comparatively high predictive accuracies were the amount of the requested loan, the applicant’s income, and whether there was a co-applicant. <text:s/></text:p>
      <text:p text:style-name="Text_20_body">The importance of the lender suggests that the loan approval process is fairly subjective. This signals a major theme of the project: there is a high degree of variation (or “randomness”) in loan approvals. <text:s/>It may be that loan officers may rely on their own subjective impressions of applicants in making a decision. <text:s/>But there may be other reasons for the variation. <text:s/>For example, different lenders may have different thresholds for risk, making some roundly more likely to approve a loan. <text:s/></text:p>
      <text:p text:style-name="Text_20_body"><office:annotation office:name="0" loext:resolved="false"><dc:creator>Seth Sharber</dc:creator><dc:date>2019-06-21T15:15:00</dc:date><text:p text:style-name="Comment_20_Text">In a few places, you make a judgment at the same time you present a result, and I think it’s better to separate those / minimize judgments, even when they seem obvious. <text:s/>I say that because sentences can otherwise come off as political, even if the point isn’t really controversial. <text:s/>I would re-phrase these pieces as “Applicant race appears to have predictive power as well, suggesting there may be inequitable discrimination in the process.”</text:p></office:annotation>Unfortunately<office:annotation-end office:name="0"/>, applicant race appears to have higher predictive power as well. <text:s/>This suggests that there may be unfair discrimination in the process. <text:s/>But a definitive conclusion cannot yet be drawn. <text:s/>The second part of this report will examine that possibility.</text:p>
      <text:h text:style-name="Heading_20_2" text:outline-level="2"><text:soft-page-break/>Categorical Features</text:h>
      <text:p text:style-name="Text_20_body">The categorical features in this dataset divide into two groups: those with a small number of categories (less than 10, call these “small categoricals”), and those with a large number of categories (ranging up to thousands, call these “big categoricals”). <text:s text:c="3"/></text:p>
      <text:p text:style-name="Text_20_body">Loan acceptance rates by each category of the small categoricals are given below. <text:s/>The features with greater differences in acceptance rates correspond to greater degrees of independent predictive accuracy.</text:p>
      <text:p text:style-name="Caption"><draw:frame draw:style-name="fr1" draw:name="Image2" text:anchor-type="paragraph" svg:width="6in" style:rel-width="scale" svg:height="4.9772in" style:rel-height="scale" draw:z-index="1"><draw:image xlink:href="Pictures/10000001000002C60000024D72E047DB.png" xlink:type="simple" xlink:show="embed" xlink:actuate="onLoad" draw:mime-type="image/png"/></draw:frame><text:span text:style-name="Comment_20_Reference"><text:span text:style-name="T1"><office:annotation office:name="1" loext:resolved="false"><dc:creator>Seth Sharber</dc:creator><dc:date>2019-06-21T15:18:00</dc:date><text:p text:style-name="Comment_20_Text">Unless this is common practice, I would want to see a key for the axes / categoricals. <text:s/>The figure otherwise feels disconnected from your narrative, or like something is being intentionally hidden.</text:p></office:annotation></text:span></text:span><office:annotation-end office:name="1"/>Loan acceptance rates by category. <text:s/></text:p>
      <text:p text:style-name="Text_20_body">Categories with greater differences in acceptance rates yield greater predictive accuracy. <text:s/>“Occupancy” (plot at bottom-center) has the least difference, and a predictive accuracy of only 0.52.</text:p>
      <text:h text:style-name="Heading_20_2" text:outline-level="2"><text:soft-page-break/>Categorical Features with Many Values</text:h>
      <text:p text:style-name="Text_20_body">“Big categoricals” had too many categories to make for efficient predictive models, but they contained valuable information. <text:s/>The initial category counts are as follow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Heading">Column</text:p>
          </table:table-cell>
          <table:table-cell table:style-name="Table3.B1" office:value-type="string">
            <text:p text:style-name="P5">Count</text:p>
          </table:table-cell>
        </table:table-row>
        <table:table-row table:style-name="Table3.1">
          <table:table-cell table:style-name="Table3.A2" office:value-type="string">
            <text:p text:style-name="Table_20_Contents">msa_md</text:p>
          </table:table-cell>
          <table:table-cell table:style-name="Table3.B2" office:value-type="string">
            <text:p text:style-name="P10">409</text:p>
          </table:table-cell>
        </table:table-row>
        <table:table-row table:style-name="Table3.1">
          <table:table-cell table:style-name="Table3.A2" office:value-type="string">
            <text:p text:style-name="Table_20_Contents">state_code</text:p>
          </table:table-cell>
          <table:table-cell table:style-name="Table3.B2" office:value-type="string">
            <text:p text:style-name="P10">53</text:p>
          </table:table-cell>
        </table:table-row>
        <table:table-row table:style-name="Table3.1">
          <table:table-cell table:style-name="Table3.A2" office:value-type="string">
            <text:p text:style-name="Table_20_Contents">county_code</text:p>
          </table:table-cell>
          <table:table-cell table:style-name="Table3.B2" office:value-type="string">
            <text:p text:style-name="P10">318</text:p>
          </table:table-cell>
        </table:table-row>
        <table:table-row table:style-name="Table3.1">
          <table:table-cell table:style-name="Table3.A2" office:value-type="string">
            <text:p text:style-name="Table_20_Contents">lender</text:p>
          </table:table-cell>
          <table:table-cell table:style-name="Table3.B2" office:value-type="string">
            <text:p text:style-name="P10">6111</text:p>
          </table:table-cell>
        </table:table-row>
      </table:table>
      <text:p text:style-name="Caption">Big categoricals: category counts.</text:p>
      <text:p text:style-name="Text_20_body">Feature engineering was performed on these features to find an efficient way to use these categories. <text:s/>Categories were grouped by their acceptance rates, in steps of 10% (as percentage points). <text:s/>If a category had too few data to get a reliable estimate of acceptance rate (a threshold at 50 was used), it was treated as unknown and grouped as such. <text:s/>The resulting loan acceptance rates are as follows. <text:s/>(Note, the category labels will be redundant, since the groups are just the acceptance rates.)</text:p>
      <text:p text:style-name="Caption"><draw:frame draw:style-name="fr1" draw:name="Image1" text:anchor-type="paragraph" svg:width="5in" style:rel-width="scale" svg:height="3.4799in" style:rel-height="scale" draw:z-index="2"><draw:image xlink:href="Pictures/10000001000002C6000001F15249A91E.png" xlink:type="simple" xlink:show="embed" xlink:actuate="onLoad" draw:mime-type="image/png"/></draw:frame><text:span text:style-name="Comment_20_Reference"><text:span text:style-name="T1"><office:annotation office:name="2" loext:resolved="false"><dc:creator>Seth Sharber</dc:creator><dc:date>2019-06-21T15:20:00</dc:date><text:p text:style-name="Comment_20_Text">Do the axes need units? <text:s text:c="2"/>Not totally sure what the numbers mean unless these are just implicitly understood when talking about predictive models. <text:s/>Captions on the figures would also help, unless that’s uncommon. <text:s text:c="2"/></text:p></office:annotation></text:span></text:span><office:annotation-end office:name="2"/>Binned big categorical features</text:p>
      <text:p text:style-name="Text_20_body">“Lender” showed incredible variation, with some lenders accepting loan applications less than 10% of the time, and others accepting loans over 90% of the time. <text:s/>This variation corresponded to the highest independent predictive accuracy of 0.66. <text:s/></text:p>
      <text:h text:style-name="Heading_20_2" text:outline-level="2"><text:soft-page-break/>Numeric Features</text:h>
      <text:p text:style-name="Text_20_body">There is little to say about the numeric features. <text:s/>They exhibit few colinearities. <text:s/>The lack of colinearity could be a major advantage … if the features were more predictive independently. <text:s/>But in this case, the variation in the data is mostly noise. <text:s/></text:p>
      <text:p text:style-name="Text_20_body">Furthermore, as the label is categorical, there is no comparison to make with numeric features, and no work to be done in terms of transformations.</text:p>
      <text:p text:style-name="Caption"><draw:frame draw:style-name="fr1" draw:name="Image3" text:anchor-type="paragraph" svg:width="6in" style:rel-width="scale" svg:height="5.9201in" style:rel-height="scale" draw:z-index="0"><draw:image xlink:href="Pictures/10000001000003880000037C1AFC5015.png" xlink:type="simple" xlink:show="embed" xlink:actuate="onLoad" draw:mime-type="image/png"/></draw:frame><text:span text:style-name="Comment_20_Reference"><text:span text:style-name="T1"><office:annotation office:name="3" loext:resolved="false"><dc:creator>Seth Sharber</dc:creator><dc:date>2019-06-21T15:22:00</dc:date><text:p text:style-name="Comment_20_Text">I think too much data is being displayed here. <text:s/>I can understand if it’s silly to have “supplemental info” with the extra plots, but I think a figure can effectively only communicate one or two trends. <text:s/>From my world that means 4 plots max, here I can see why it’s more, but it’s hard to extract meaning when looking at 25 together.</text:p></office:annotation></text:span></text:span><office:annotation-end office:name="3"/>Selected numeric columns, sampled, plotted against each other in scatter plot. <text:s/>The label is categorical and not shown.</text:p>
      <text:h text:style-name="Heading_20_2" text:outline-level="2"><text:soft-page-break/>Modeling and Prediction</text:h>
      <text:p text:style-name="Text_20_body"><office:annotation office:name="4" loext:resolved="false"><dc:creator>Seth Sharber</dc:creator><dc:date>2019-06-21T15:25:00</dc:date><text:p text:style-name="Comment_20_Text">Rephrase, weak start to the section.</text:p><text:p text:style-name="Comment_20_Text">“The neural network demonstrated the best performance out of multiple algorithms.”</text:p></office:annotation>In search of the best model, multiple algorithms were tried. <text:s/>The neural network was the top performing algorithm<office:annotation-end office:name="4"/>. <text:s/>This model had two latent layers with 30 nodes each. <text:s/>The model also had the advantage of a large training set (over 320,000 data). <text:s/>However, it only achieved 70% accuracy on test data. <text:s/></text:p>
      <text:p text:style-name="Text_20_body">This result provides substantial support for the conclusion that there is a high degree of noise in loan acceptances. <text:s/>It looks that loan acceptances cannot be predicted to a high degree of accuracy. <text:s/></text:p>
      <text:p text:style-name="Text_20_body">Basic logistic regression was also tried. <text:s/>This model achieved a 69% accuracy on the test data, only 1 percentage point lower than the neural network. <text:s/>Logistic regression is the most basic classification model, separating the data based on a simple weighted sum of the features. <text:s/>The neural network model used is substantially more complex. <text:s/>The fact that the neural network barely outperformed logistic regression adds support for the conclusion that loan acceptances cannot be predicted with high accuracy.</text:p>
      <text:p text:style-name="Text_20_body">The results for all models tried are below. <text:s/>All fell within a narrow window of about 1.5 percentage points. 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Model</text:p>
          </table:table-cell>
          <table:table-cell table:style-name="Table4.B1" office:value-type="string">
            <text:p text:style-name="P5">Accuracy</text:p>
          </table:table-cell>
        </table:table-row>
        <table:table-row table:style-name="Table4.1">
          <table:table-cell table:style-name="Table4.A2" office:value-type="string">
            <text:p text:style-name="Table_20_Contents">Logistic Regression</text:p>
          </table:table-cell>
          <table:table-cell table:style-name="Table4.B2" office:value-type="string">
            <text:p text:style-name="P10">69.1</text:p>
          </table:table-cell>
        </table:table-row>
        <table:table-row table:style-name="Table4.1">
          <table:table-cell table:style-name="Table4.A2" office:value-type="string">
            <text:p text:style-name="Table_20_Contents">Decision Tree <text:s/>(max depth = 12)</text:p>
          </table:table-cell>
          <table:table-cell table:style-name="Table4.B2" office:value-type="string">
            <text:p text:style-name="P10">69.4</text:p>
          </table:table-cell>
        </table:table-row>
        <table:table-row table:style-name="Table4.1">
          <table:table-cell table:style-name="Table4.A2" office:value-type="string">
            <text:p text:style-name="Table_20_Contents">Random Forest <text:s/>(40 classifiers)</text:p>
          </table:table-cell>
          <table:table-cell table:style-name="Table4.B2" office:value-type="string">
            <text:p text:style-name="P10">69.0</text:p>
          </table:table-cell>
        </table:table-row>
        <table:table-row table:style-name="Table4.1">
          <table:table-cell table:style-name="Table4.A2" office:value-type="string">
            <text:p text:style-name="Table_20_Contents">Support Vector Machines</text:p>
          </table:table-cell>
          <table:table-cell table:style-name="Table4.B2" office:value-type="string">
            <text:p text:style-name="P10">69.1</text:p>
          </table:table-cell>
        </table:table-row>
        <table:table-row table:style-name="Table4.1">
          <table:table-cell table:style-name="Table4.A2" office:value-type="string">
            <text:p text:style-name="Table_20_Contents">AdaBoost</text:p>
          </table:table-cell>
          <table:table-cell table:style-name="Table4.B2" office:value-type="string">
            <text:p text:style-name="P10">69.6</text:p>
          </table:table-cell>
        </table:table-row>
        <table:table-row table:style-name="Table4.1">
          <table:table-cell table:style-name="Table4.A2" office:value-type="string">
            <text:p text:style-name="Table_20_Contents">Neural Network <text:s/>(Hidden layers: 30, 30)</text:p>
          </table:table-cell>
          <table:table-cell table:style-name="Table4.B2" office:value-type="string">
            <text:p text:style-name="P10">70.6</text:p>
          </table:table-cell>
        </table:table-row>
      </table:table>
      <text:p text:style-name="Caption">Comparison of model accuracy on the small set of selected features vs. all features. <text:s/>Using all features yielded a tiny improvement.</text:p>
      <text:h text:style-name="Heading_20_2" text:outline-level="2">Feature Selection</text:h>
      <text:p text:style-name="Text_20_body">Recall that logistic regressions were run on each feature to see its independent predictive power. <text:s/>Test accuracy ranged from 0.66 to 0.52, with a fairly smooth distribution between 0.58 and 0.52. <text:s/></text:p>
      <text:p text:style-name="Text_20_body">Since the dataset was balanced, random guessing would result in an accuracy of 0.50. <text:s/>So an accuracy of only 0.52 is low indeed. <text:s/>This raised the question of how much predictive <text:soft-page-break/>accuracy could be preserved with a subset of the features. <text:s/>The advantage of early feature selection is efficient processing and improved generalizability without the need for regularization. <text:s/>Could a chunk of the features be discarded, without real cost of predictive accuracy?</text:p>
      <text:p text:style-name="Text_20_body">A criterion of 55% seemed a promising choice as a threshold. <text:s/>Features that scored an independent predictive accuracy of 0.55 or higher were selected. <text:s/>The criterion cut the feature set in half. <text:s/>At the risk of repetition, the feature accuracies are shown below.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Selected Features</text:p>
          </table:table-cell>
          <table:table-cell table:style-name="Table5.B1" office:value-type="string">
            <text:p text:style-name="P5">Acc.</text:p>
          </table:table-cell>
          <table:table-cell table:style-name="Table5.C1" office:value-type="string">
            <text:p text:style-name="Table_20_Contents"/>
          </table:table-cell>
          <table:table-cell table:style-name="Table5.D1" office:value-type="string">
            <text:p text:style-name="P11">Rejected Features</text:p>
          </table:table-cell>
          <table:table-cell table:style-name="Table5.E1" office:value-type="string">
            <text:p text:style-name="P12">Acc.</text:p>
          </table:table-cell>
        </table:table-row>
        <table:table-row table:style-name="Table5.1">
          <table:table-cell table:style-name="Table5.A2" office:value-type="string">
            <text:p text:style-name="Standard">lender</text:p>
          </table:table-cell>
          <table:table-cell table:style-name="Table5.B2" office:value-type="string">
            <text:p text:style-name="P7">0.66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property_type</text:p>
          </table:table-cell>
          <table:table-cell table:style-name="Table5.E2" office:value-type="string">
            <text:p text:style-name="P14">0.54</text:p>
          </table:table-cell>
        </table:table-row>
        <table:table-row table:style-name="Table5.1">
          <table:table-cell table:style-name="Table5.A3" office:value-type="string">
            <text:p text:style-name="Standard">loan_purpose</text:p>
          </table:table-cell>
          <table:table-cell table:style-name="Table5.B3" office:value-type="string">
            <text:p text:style-name="P7">0.61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state_code</text:p>
          </table:table-cell>
          <table:table-cell table:style-name="Table5.E2" office:value-type="string">
            <text:p text:style-name="P14">0.54</text:p>
          </table:table-cell>
        </table:table-row>
        <table:table-row table:style-name="Table5.1">
          <table:table-cell table:style-name="Table5.A4" office:value-type="string">
            <text:p text:style-name="Standard">loan_amount</text:p>
          </table:table-cell>
          <table:table-cell table:style-name="Table5.B4" office:value-type="string">
            <text:p text:style-name="P7">0.58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applicant_sex</text:p>
          </table:table-cell>
          <table:table-cell table:style-name="Table5.E2" office:value-type="string">
            <text:p text:style-name="P14">0.53</text:p>
          </table:table-cell>
        </table:table-row>
        <table:table-row table:style-name="Table5.1">
          <table:table-cell table:style-name="Table5.A5" office:value-type="string">
            <text:p text:style-name="Standard">applicant_income</text:p>
          </table:table-cell>
          <table:table-cell table:style-name="Table5.B5" office:value-type="string">
            <text:p text:style-name="P7">0.58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preapproval</text:p>
          </table:table-cell>
          <table:table-cell table:style-name="Table5.E2" office:value-type="string">
            <text:p text:style-name="P14">0.53</text:p>
          </table:table-cell>
        </table:table-row>
        <table:table-row table:style-name="Table5.1">
          <table:table-cell table:style-name="Table5.A6" office:value-type="string">
            <text:p text:style-name="Standard">applicant_race</text:p>
          </table:table-cell>
          <table:table-cell table:style-name="Table5.B6" office:value-type="string">
            <text:p text:style-name="P7">0.57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county_code</text:p>
          </table:table-cell>
          <table:table-cell table:style-name="Table5.E2" office:value-type="string">
            <text:p text:style-name="P14">0.53</text:p>
          </table:table-cell>
        </table:table-row>
        <table:table-row table:style-name="Table5.1">
          <table:table-cell table:style-name="Table5.A7" office:value-type="string">
            <text:p text:style-name="Standard">applicant_ethnicity</text:p>
          </table:table-cell>
          <table:table-cell table:style-name="Table5.B7" office:value-type="string">
            <text:p text:style-name="P7">0.55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loan_type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A8" office:value-type="string">
            <text:p text:style-name="Standard">co_applicant</text:p>
          </table:table-cell>
          <table:table-cell table:style-name="Table5.B8" office:value-type="string">
            <text:p text:style-name="P7">0.55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occupancy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A9" office:value-type="string">
            <text:p text:style-name="Standard">msa_md</text:p>
          </table:table-cell>
          <table:table-cell table:style-name="Table5.B9" office:value-type="string">
            <text:p text:style-name="P7">0.55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population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A10" office:value-type="string">
            <text:p text:style-name="Standard">minority_population_pct</text:p>
          </table:table-cell>
          <table:table-cell table:style-name="Table5.B10" office:value-type="string">
            <text:p text:style-name="P7">0.55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ffiecmedian_family_income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A11" office:value-type="string">
            <text:p text:style-name="Standard">tract_to_msa_md_income_pct</text:p>
          </table:table-cell>
          <table:table-cell table:style-name="Table5.B11" office:value-type="string">
            <text:p text:style-name="P7">0.55</text:p>
          </table:table-cell>
          <table:table-cell table:style-name="Table5.C1" office:value-type="string">
            <text:p text:style-name="P7"/>
          </table:table-cell>
          <table:table-cell table:style-name="Table5.D2" office:value-type="string">
            <text:p text:style-name="P13">number_of_owner-occupied_units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C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  <table:table-cell table:style-name="Table5.D2" office:value-type="string">
            <text:p text:style-name="P13">number_of_1_to_4_family_units</text:p>
          </table:table-cell>
          <table:table-cell table:style-name="Table5.E2" office:value-type="string">
            <text:p text:style-name="P14">0.52</text:p>
          </table:table-cell>
        </table:table-row>
        <table:table-row table:style-name="Table5.1">
          <table:table-cell table:style-name="Table5.C1" table:number-columns-spanned="5" office:value-type="string">
            <text:p text:style-name="P8">Features in the dataset were tested with independent logistic regressions; their accuracy scores are shown here. <text:s/>Features with an accuracy of 0.55 and up were selected.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>Using just the significant features gave nearly the same result as using the whole set. <text:s/>This suggests that the significant features did contain the majority of the predictive power in the dataset. <text:s/>A tiny predictive improvement is gained by including the rest of the features.</text:p>
      <table:table table:name="Table6" table:style-name="Table6">
        <table:table-column table:style-name="Table6.A"/>
        <table:table-column table:style-name="Table6.B" table:number-columns-repeated="2"/>
        <text:soft-page-break/>
        <table:table-row table:style-name="Table6.1">
          <table:table-cell table:style-name="Table6.A1" office:value-type="string">
            <text:p text:style-name="Table_20_Heading">Model</text:p>
          </table:table-cell>
          <table:table-cell table:style-name="Table6.B1" office:value-type="string">
            <text:p text:style-name="P5">Selected Features</text:p>
          </table:table-cell>
          <table:table-cell table:style-name="Table6.C1" office:value-type="string">
            <text:p text:style-name="P5">All Features</text:p>
          </table:table-cell>
        </table:table-row>
        <table:table-row table:style-name="Table6.1">
          <table:table-cell table:style-name="Table6.A2" office:value-type="string">
            <text:p text:style-name="Table_20_Contents">Logistic Regression</text:p>
          </table:table-cell>
          <table:table-cell table:style-name="Table6.B2" office:value-type="string">
            <text:p text:style-name="P10">68.9</text:p>
          </table:table-cell>
          <table:table-cell table:style-name="Table6.C2" office:value-type="string">
            <text:p text:style-name="P10">69.1</text:p>
          </table:table-cell>
        </table:table-row>
        <table:table-row table:style-name="Table6.1">
          <table:table-cell table:style-name="Table6.A2" office:value-type="string">
            <text:p text:style-name="Table_20_Contents">Decision Tree <text:s/>(max depth = 12)</text:p>
          </table:table-cell>
          <table:table-cell table:style-name="Table6.B2" office:value-type="string">
            <text:p text:style-name="P10">69.2</text:p>
          </table:table-cell>
          <table:table-cell table:style-name="Table6.C2" office:value-type="string">
            <text:p text:style-name="P10">69.4</text:p>
          </table:table-cell>
        </table:table-row>
        <table:table-row table:style-name="Table6.1">
          <table:table-cell table:style-name="Table6.A2" office:value-type="string">
            <text:p text:style-name="Table_20_Contents">Random Forest <text:s/>(40 classifiers)</text:p>
          </table:table-cell>
          <table:table-cell table:style-name="Table6.B2" office:value-type="string">
            <text:p text:style-name="P10">67.6</text:p>
          </table:table-cell>
          <table:table-cell table:style-name="Table6.C2" office:value-type="string">
            <text:p text:style-name="P10">69.0</text:p>
          </table:table-cell>
        </table:table-row>
        <table:table-row table:style-name="Table6.1">
          <table:table-cell table:style-name="Table6.A2" office:value-type="string">
            <text:p text:style-name="Table_20_Contents">Support Vector Machines</text:p>
          </table:table-cell>
          <table:table-cell table:style-name="Table6.B2" office:value-type="string">
            <text:p text:style-name="P10">68.9</text:p>
          </table:table-cell>
          <table:table-cell table:style-name="Table6.C2" office:value-type="string">
            <text:p text:style-name="P10">69.1</text:p>
          </table:table-cell>
        </table:table-row>
        <table:table-row table:style-name="Table6.1">
          <table:table-cell table:style-name="Table6.A2" office:value-type="string">
            <text:p text:style-name="Table_20_Contents">AdaBoost</text:p>
          </table:table-cell>
          <table:table-cell table:style-name="Table6.B2" office:value-type="string">
            <text:p text:style-name="P10">69.5</text:p>
          </table:table-cell>
          <table:table-cell table:style-name="Table6.C2" office:value-type="string">
            <text:p text:style-name="P10">69.6</text:p>
          </table:table-cell>
        </table:table-row>
        <table:table-row table:style-name="Table6.1">
          <table:table-cell table:style-name="Table6.A2" office:value-type="string">
            <text:p text:style-name="Table_20_Contents">Neural Network <text:s/>(Hidden layers: 30, 30)</text:p>
          </table:table-cell>
          <table:table-cell table:style-name="Table6.B2" office:value-type="string">
            <text:p text:style-name="P10">70.3</text:p>
          </table:table-cell>
          <table:table-cell table:style-name="Table6.C2" office:value-type="string">
            <text:p text:style-name="P10">70.6</text:p>
          </table:table-cell>
        </table:table-row>
        <table:table-row table:style-name="Table6.1">
          <table:table-cell table:style-name="Table6.A8" table:number-columns-spanned="3" office:value-type="string">
            <text:p text:style-name="P15">Comparison of model accuracies on the set of selected features vs. all features. <text:s/>Using all features yielded a tiny improvement: 0.2-0.3 percentage points in most cases.</text:p>
          </table:table-cell>
          <table:covered-table-cell/>
          <table:covered-table-cell/>
        </table:table-row>
      </table:table>
      <text:h text:style-name="Heading_20_2" text:outline-level="2">Comment on Predictability</text:h>
      <text:p text:style-name="Text_20_body">What explains the low degree of predictability in the home mortgage system?<text:span text:style-name="Default_20_Paragraph_20_Font"><text:span text:style-name="T2"> <text:s/></text:span></text:span>Other <office:annotation office:name="5" loext:resolved="false"><dc:creator>Seth Sharber</dc:creator><dc:date>2019-06-21T15:27:00</dc:date><text:p text:style-name="Comment_20_Text">Key examples?</text:p></office:annotation>systems are much <office:annotation-end office:name="5"/>more predictable. <text:s/>Graeme Malcolm has shown, for example, that classes of automobile prices—standard vs. premium, defined with a threshold price of $12,000—can be predicted to 95.5% accuracy with a much smaller dataset (216).<text:span text:style-name="Footnote_20_Reference"><text:note text:id="ftn2" text:note-class="footnote"><text:note-citation>1</text:note-citation><text:note-body><text:p text:style-name="Footnote">Malcolm, Graeme. <text:s/>“Analysis of Automobile Prices.” <text:s/><text:a xlink:type="simple" xlink:href="https://d37djvu3ytnwxt.cloudfront.net/assets/courseware/v1/5254cc7d5dbf2f4978ae77d524ac7bb4/asset-v1:Microsoft+DAT102x+2T2017+type@asset+block/Analysis_of_Automobile_Prices.pdf" office:target-frame-name="_top" xlink:show="replace" text:style-name="Internet_20_link" text:visited-style-name="Visited_20_Internet_20_Link">(Online).</text:a></text:p></text:note-body></text:note></text:span></text:p>
      <text:p text:style-name="Text_20_body">A major difference is that there is greater variation in loan applicants than there is in cars. <text:s/>Cars are made to be homogeneous by model, but loan applicants are not factory made. <text:s/>Cars may even be designed with a specific price point in mind, so designers may put some thought into calibrating features with price as price-signals. <text:s/><text:span text:style-name="T3">Loan applicants, as it were, “come as they are.”</text:span></text:p>
      <text:p text:style-name="Text_20_body">The loan application process is intensive and individualized, whereas new cars of the same make are treated as equivalent by buyers. <text:s/>In the loan application process, an underwriter goes through the applicant’s financial information in detail, looking for any potential problem with a loan. <text:s/>This process means that many factors will be considered that outstrip the data recorded here. <text:s/>Different lenders may have drastically different attitudes toward risk, adding to the variation in the data for loan applicants. <text:s/>(As noted earlier, lenders showed a surprising degree of variation in acceptance rates.) <text:s/>In addition, the extensive, individualized review involved in the loan application process likely introduces opportunity for subjectivity. <text:s/></text:p>
      <text:p text:style-name="Text_20_body"><text:soft-page-break/>In short, there are major differences between these two systems. <text:s/>Thus, the low predictability of loan rates makes some sense. <text:s/>But the variation and potential for subjectivity involved raises an important question: does the loan acceptance system involve unfair discrimination?</text:p>
      <text:h text:style-name="Heading_20_1" text:outline-level="1">Evaluating Discrimination</text:h>
      <text:p text:style-name="Text_20_body">The stated purpose of the HMDA is to see whether discrimination is occurring in the lending industry for housing. <text:s/>Here “discrimination” means unfair discrimination, <text:span text:style-name="Default_20_Paragraph_20_Font"><text:span text:style-name="T4">viz.</text:span></text:span> that based on race, ethnicity, or sex. <text:s/></text:p>
      <text:p text:style-name="Text_20_body">In reviewing the data, we noted that both applicant race and ethnicity had notable predictive accuracy as independent features. <text:s/>In addition, applicant sex gives some degree of predictive power as well. <text:s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Feature</text:p>
          </table:table-cell>
          <table:table-cell table:style-name="Table7.B1" office:value-type="string">
            <text:p text:style-name="P5">Acc.</text:p>
          </table:table-cell>
        </table:table-row>
        <table:table-row table:style-name="Table7.1">
          <table:table-cell table:style-name="Table7.A2" office:value-type="string">
            <text:p text:style-name="Standard">applicant_race</text:p>
          </table:table-cell>
          <table:table-cell table:style-name="Table7.B2" office:value-type="string">
            <text:p text:style-name="P7">0.57</text:p>
          </table:table-cell>
        </table:table-row>
        <table:table-row table:style-name="Table7.1">
          <table:table-cell table:style-name="Table7.A2" office:value-type="string">
            <text:p text:style-name="Standard">applicant_ethnicity</text:p>
          </table:table-cell>
          <table:table-cell table:style-name="Table7.B2" office:value-type="string">
            <text:p text:style-name="P7">0.55</text:p>
          </table:table-cell>
        </table:table-row>
        <table:table-row table:style-name="Table7.1">
          <table:table-cell table:style-name="Table7.A2" office:value-type="string">
            <text:p text:style-name="Standard">applicant_sex</text:p>
          </table:table-cell>
          <table:table-cell table:style-name="Table7.B2" office:value-type="string">
            <text:p text:style-name="P7">0.53</text:p>
          </table:table-cell>
        </table:table-row>
      </table:table>
      <text:p text:style-name="Text_20_body"/>
      <text:p text:style-name="Text_20_body"><office:annotation office:name="6" loext:resolved="false"><dc:creator>Seth Sharber</dc:creator><dc:date>2019-06-21T15:27:00</dc:date><text:p text:style-name="Comment_20_Text">This is the paragraph I felt critical about. <text:s/>So far has been a quantitative discussion, and while I now want to see interpretation, this evaluation feels heavy-handed, like what I would expect in a philosophy text. <text:s/>I would simply re-phrase this to say “While correlation between loan acceptance rates and factors <text:s/>such as race would initially suggest discrimination, assessments may be considering co-incident legitimate socioeconomic factors such as income.” <text:s/>There’s more to be said about systemic problems from that claim, but here I like the interpretation to be a little more straightforward and less preachy.</text:p></office:annotation>This looks damning. <text:s/>If we can predict loan acceptance based on unfair features such as race, then discrimination is occurring, right? <text:s/>Not necessarily. <text:s/>It may be that loan officers are making judgments on perfectly legitimate features that correlate with unfair ones, and that the decisions are not discriminatory after all. <text:s/>Principally, race is known to correlate with socio-economic status (SES), which is a legitimate factor in offering a loan. <text:s/>Thus a fair loan officer, one that only makes decisions based on legitimate factors,<text:span text:style-name="Default_20_Paragraph_20_Font"><text:span text:style-name="T2"> </text:span></text:span>will accept loan applications at differential rates with regard to race. <text:s/><office:annotation-end office:name="6"/></text:p>
      <text:p text:style-name="Text_20_body">Thus the problem of detecting discrimination is more difficult than that of simply determining a stastitical difference. <text:s/>The basic statistical analysis of categorical systems is to look for a statistically significant difference between two groups using a chi-squared test. <text:s/>Here, the chi-squared test would surely determine a difference in loan acceptance rates between racial categories, but this would not determine that discrimination is occuring.</text:p>
      <text:p text:style-name="Text_20_body">To be clear on this <office:annotation office:name="7" loext:resolved="false"><dc:creator>Seth Sharber</dc:creator><dc:date>2019-06-21T15:34:00</dc:date><text:p text:style-name="Comment_20_Text">I think this sort of evaluation could stay or go, depending on how you want the paper as a whole to read. <text:s/>I think the content here could still be re-phrased so the interpretation is less heavy-handed. <text:s/>Since the paper is ending on this tone, it colors the rest of the paper with this voicing – depends on what you want.</text:p></office:annotation>situation, let us make a couple of side notes. <text:s/>First, these predictive accuracies basically prove that there is <text:span text:style-name="Default_20_Paragraph_20_Font"><text:span text:style-name="T4">something </text:span></text:span>unfair in our society. <text:s/>Nobody is saying, for example, that it is good or fair for SES to correlate with race on the broad <text:soft-page-break/>societal scale. <text:s/>But this point is beyond our scope<office:annotation-end office:name="7"/>. <text:s/>The project here is to look at the decision-making of loan officers. <text:s/></text:p>
      <text:p text:style-name="Text_20_body">Second, based on objective data, it is only possible to see whether loan officers are making decisions based on unfair features. <text:s/>It cannot show us the inner thoughts and attitudes of loan officers. <text:s/>Uncovering personal prejudice requires something like a psychological test. <text:s/>This is also beyond our scope.<text:span text:style-name="Footnote_20_Reference"><text:note text:id="ftn3" text:note-class="footnote"><text:note-citation>2</text:note-citation><text:note-body><text:p text:style-name="Footnote">Psychology’s mainstay test for detecting internal attitudes of prejudice is the Implicit-Association Test. <text:s/>A test like this would be required to determine how loan officers <text:span text:style-name="Default_20_Paragraph_20_Font"><text:span text:style-name="T4">feel</text:span></text:span> about different groups, which is a less available question than whether their <text:span text:style-name="Default_20_Paragraph_20_Font"><text:span text:style-name="T4">decisions</text:span></text:span> show discrimination. <text:s/>However, the validity of the Implicit-Association Test has recently been called into question. <text:s/>See <text:a xlink:type="simple" xlink:href="https://www.chronicle.com/article/Can-We-Really-Measure-Implicit/238807" office:target-frame-name="_top" xlink:show="replace" text:style-name="Internet_20_link" text:visited-style-name="Visited_20_Internet_20_Link">"Can We Really Measure Implicit Bias? <text:s/>Maybe Not."</text:a></text:p></text:note-body></text:note></text:span></text:p>
      <text:p text:style-name="Text_20_body">Third, certain kinds of features can serve as proxies for discrimination. <text:s/>In this context, a “proxy” is a feature that correlates with an unfair feature, and can be used as a veiled method for discriminating. <text:s/>For example, an applicant’s hometown, or by extension county, is somewhat predictive of their race, and has no apparent value in determining whether an applicant should receive a loan. <text:s/>So one must have a plan for potential proxy features.</text:p>
      <text:p text:style-name="Text_20_body">These points guide the method of this project. <text:s/>The author makes two main assumptions.</text:p>
      <text:h text:style-name="Heading_20_3" text:outline-level="3">Assumptions</text:h>
      <text:list text:style-name="L2">
        <text:list-item>
          <text:p text:style-name="P16">Loan officers take full advantage of all non-discriminatory features in making decisions. <text:s/>(This assumption avoids the pitfall of delivering a bad verdict too quickly.)</text:p>
        </text:list-item>
        <text:list-item>
          <text:p text:style-name="P16">The role of a feature in the decision-making process is reflected in the predictive power of that feature.</text:p>
        </text:list-item>
      </text:list>
      <text:p text:style-name="Text_20_body">These assumptions are consistent with a step-wise comparison of predictive power. <text:s/>The features are divided into three categories: fair features, unfair features, and potential proxies. <text:s/>First, a predictive model will be trained on the predictive features, its predictive accuracy noted. <text:s/>Given our assumptions, the degree of predictive accuracy in the first set is considered legitimate, accounted for by fair features. <text:s/>Second, the unfair features are included and another predictive model (of the same family) is trained. <text:s/>If this second model is <text:span text:style-name="Default_20_Paragraph_20_Font"><text:span text:style-name="T4">more </text:span></text:span>predictive than the first, unfair discrimination would explain the additional predictive power. <text:s/>But if the second model is no more (or barely more) predictive than the first, discrimination is counted non-existent or negligible (respectively). <text:s/>The last set of features, the proxies, are left out completely. <text:s/>The goal at this point is not to achieve maximal predictive power, so the potential predictive power that these features offer is not important. <text:s text:c="2"/>The general stepwise approach follows Espenshade and others in detecting discrimination in admissions to elite universities.<text:span text:style-name="Footnote_20_Reference"><text:note text:id="ftn4" text:note-class="footnote"><text:note-citation>3</text:note-citation><text:note-body><text:p text:style-name="Footnote">Espenshade <text:span text:style-name="Default_20_Paragraph_20_Font"><text:span text:style-name="T4">et al</text:span></text:span>. <text:s/>“Admission Preferences for Minority Students, Athletes, and Legacies at<text:line-break/>Elite Universities.”<text:span text:style-name="Default_20_Paragraph_20_Font"><text:span text:style-name="T4"> <text:s/>Social Science Quarterly, </text:span></text:span>Volume 85, Number 5, December 2004. <text:s/><text:a xlink:type="simple" xlink:href="https://www.princeton.edu/~tje/files/webAdmission%20Preferences%20Espenshade%20Chung%20Walling%20Dec%202004.pdf" office:target-frame-name="_top" xlink:show="replace" text:style-name="Internet_20_link" text:visited-style-name="Visited_20_Internet_20_Link"><text:span text:style-name="Default_20_Paragraph_20_Font"><text:span text:style-name="T4">Online.</text:span></text:span></text:a><text:span text:style-name="Default_20_Paragraph_20_Font"><text:span text:style-name="T4"><text:line-break/></text:span></text:span></text:p></text:note-body></text:note></text:span></text:p>
      <text:p text:style-name="Text_20_body"><text:soft-page-break/>Basic logistic regression is chosen as the predictive model. <text:s/>One reason is the relative success of logistic regression in the first part of this project, scoring just 1 percentage point lower than the neural network. <text:s/>The other reason is that Espenshade’s group used logistic regression for their paper.</text:p>
      <text:p text:style-name="Text_20_body">In review, here is the method for detecting discrimination.</text:p>
      <text:h text:style-name="Heading_20_3" text:outline-level="3">Method</text:h>
      <text:list text:style-name="L3">
        <text:list-item>
          <text:p text:style-name="P17">Train a logistic regression model on fair features, noting its predictive accuracy.</text:p>
        </text:list-item>
        <text:list-item>
          <text:p text:style-name="P17">Combine fair features and unfair features, and train another logistic regression model on this set. <text:s/></text:p>
        </text:list-item>
        <text:list-item>
          <text:p text:style-name="P17">If the second set out-predicts the first by more than 0.5 percentage points, conclude that loan officers are discriminating to a significant degree.</text:p>
        </text:list-item>
      </text:list>
      <text:p text:style-name="Text_20_body">The features are segregated as follows.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Table_20_Heading">Unfair Features</text:p>
          </table:table-cell>
          <table:table-cell table:style-name="Table8.A1" office:value-type="string">
            <text:p text:style-name="Table_20_Heading">Proxy Features</text:p>
          </table:table-cell>
          <table:table-cell table:style-name="Table8.C1" office:value-type="string">
            <text:p text:style-name="Table_20_Heading">Fair Features</text:p>
          </table:table-cell>
        </table:table-row>
        <table:table-row table:style-name="Table8.1">
          <table:table-cell table:style-name="Table8.A2" office:value-type="string">
            <text:p text:style-name="Text_20_body">applicant_ethnicity</text:p>
            <text:p text:style-name="Text_20_body">applicant_sex</text:p>
            <text:p text:style-name="Text_20_body">applicant_race</text:p>
          </table:table-cell>
          <table:table-cell table:style-name="Table8.A2" office:value-type="string">
            <text:p text:style-name="Text_20_body">minority_population_pct</text:p>
            <text:p text:style-name="Text_20_body">msa-md</text:p>
            <text:p text:style-name="Text_20_body">county_code</text:p>
            <text:p text:style-name="Text_20_body">state_code</text:p>
          </table:table-cell>
          <table:table-cell table:style-name="Table8.C2" office:value-type="string">
            <text:p text:style-name="Table_20_Contents"><text:span text:style-name="Default_20_Paragraph_20_Font"><text:span text:style-name="T4">All other features</text:span></text:span>.</text:p>
          </table:table-cell>
        </table:table-row>
      </table:table>
      <text:h text:style-name="Heading_20_2" text:outline-level="2">Results</text:h>
      <text:p text:style-name="Text_20_body">While the unfair features do represent additional predictive accuracy, the marginal boost is tiny: 0.2 percentage points. <text:s/>It would be nice if the extra accuracy could be waved off as pure error. <text:s/>Since the dataset is quite large (the training set size is about 330,000), and since accuracy was judged on test data, it indicates a real phenomenon. 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>Logistic Regression, Only Fair Features</text:p>
          </table:table-cell>
          <table:table-cell table:style-name="Table9.B1" office:value-type="string">
            <text:p text:style-name="P10">68.6%</text:p>
          </table:table-cell>
        </table:table-row>
        <table:table-row table:style-name="Table9.1">
          <table:table-cell table:style-name="Table9.A2" office:value-type="string">
            <text:p text:style-name="Table_20_Contents">Logistic Regression, Fair &amp; Unfair</text:p>
          </table:table-cell>
          <table:table-cell table:style-name="Table9.B2" office:value-type="string">
            <text:p text:style-name="P10">68.8%</text:p>
          </table:table-cell>
        </table:table-row>
        <table:table-row table:style-name="Table9.1">
          <table:table-cell table:style-name="Table9.A2" office:value-type="string">
            <text:p text:style-name="P18">Difference (percentage points)</text:p>
          </table:table-cell>
          <table:table-cell table:style-name="Table9.B2" office:value-type="string">
            <text:p text:style-name="P19">0.2</text:p>
          </table:table-cell>
        </table:table-row>
      </table:table>
      <text:p text:style-name="Text_20_body"/>
      <text:p text:style-name="Text_20_body">The predictive advantage falls below the threshold set. <text:s/>Thus the relatively happy conclusion is that discrimination in home mortgages is not significant.</text:p>
      <text:h text:style-name="Heading_20_2" text:outline-level="2"><text:soft-page-break/>Conclusion</text:h>
      <text:p text:style-name="Text_20_body">This concludes the analysis of home mortgage data. <text:s/>The first part showed that loan acceptances are difficult to predict from broad, objective data. <text:s/>Loan applicants are scrutinized on an individual basis, and lenders differ dramatically in acceptance rates. <text:s/>The second part analyzed potential discrimination. <text:s/>Initial predictive data was consistent with widespread discrimination. <text:s/>But further analysis showed that while discrimination does occur, it is rare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svg:stroke-opacity="100%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6in" fo:margin-bottom="0.0799in" style:contextual-spacing="false" fo:hyphenation-ladder-count="no-limit" fo:hyphenation-keep="auto" loext:hyphenation-keep-type="column" loext:hyphenation-keep-line="false"/>
      <style:text-properties fo:color="#21409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4in" fo:margin-bottom="0.0799in" style:contextual-spacing="false" fo:hyphenation-ladder-count="no-limit" fo:hyphenation-keep="auto" loext:hyphenation-keep-type="column" loext:hyphenation-keep-line="false"/>
      <style:text-properties fo:color="#0066b3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 loext:hyphenation-keep-line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left="0.6in" fo:margin-right="0.6in" fo:margin-top="0in" fo:margin-bottom="0.2in" style:contextual-spacing="false" fo:text-align="center" style:justify-single-word="false" fo:hyphenation-ladder-count="no-limit" fo:hyphenation-keep="auto" loext:hyphenation-keep-type="column" loext:hyphenation-keep-line="false" text:number-lines="false" text:line-number="0">
        <style:tab-stops/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 loext:hyphenation-keep-line="false"/>
      <style:text-properties fo:color="#5c2d91" loext:opacity="100%" fo:font-size="14pt" fo:font-weight="bold" style:font-size-asian="14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Caption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54in" fo:margin-top="0in" fo:margin-bottom="0.0402in" style:contextual-spacing="false" fo:hyphenation-ladder-count="no-limit" fo:hyphenation-keep="auto" loext:hyphenation-keep-type="column" loext:hyphenation-keep-line="false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2354in" fo:hyphenation-ladder-count="no-limit" fo:hyphenation-keep="auto" loext:hyphenation-keep-type="column" loext:hyphenation-keep-line="false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meta:initial-creator>Seth Sharber</meta:initial-creator>
    <meta:creation-date>2019-06-21T19:16:00Z</meta:creation-date>
    <dc:date>2026-05-11T11:51:14.162050338</dc:date>
    <meta:editing-cycles>7</meta:editing-cycles>
    <meta:editing-duration>PT1H11M42S</meta:editing-duration>
    <meta:document-statistic meta:table-count="9" meta:image-count="3" meta:object-count="0" meta:page-count="13" meta:paragraph-count="247" meta:word-count="2783" meta:character-count="18420" meta:non-whitespace-character-count="15729"/>
    <meta:template xlink:type="simple" xlink:actuate="onRequest" xlink:title="" xlink:href="Normal.dotm"/>
  </office:meta>
</office:document-meta>
</file>